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8C0000015F3EDE716E.png" manifest:media-type="image/png"/>
  <manifest:file-entry manifest:full-path="Pictures/100000010000038C0000015FA5A6A67A.png" manifest:media-type="image/png"/>
  <manifest:file-entry manifest:full-path="Pictures/100000010000036B00000154C89FC70E.png" manifest:media-type="image/png"/>
  <manifest:file-entry manifest:full-path="Pictures/100000010000048A000003332E63F17A.png" manifest:media-type="image/png"/>
  <manifest:file-entry manifest:full-path="Pictures/100000010000048A00000333123C7681.png" manifest:media-type="image/png"/>
  <manifest:file-entry manifest:full-path="Pictures/100000010000048A00000333762984B1.png" manifest:media-type="image/png"/>
  <manifest:file-entry manifest:full-path="Pictures/1000000000000CEC000009B17C6E9ABE.jpg" manifest:media-type="image/jpeg"/>
  <manifest:file-entry manifest:full-path="Pictures/1000000000000CEB000009B0032082B5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BigNoodleTitling" svg:font-family="BigNoodleTitling" style:font-pitch="variable"/>
    <style:font-face style:name="Cabin" svg:font-family="Cabin" style:font-pitch="variable"/>
    <style:font-face style:name="Cabin1" svg:font-family="Cabin" style:font-adornments="Regular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eague Gothic" svg:font-family="'League Gothic'" style:font-family-generic="swiss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Clean_25_20Inspiration-title">
      <style:graphic-properties fo:min-height="4.615cm" loext:decorative="false"/>
      <style:paragraph-properties style:writing-mode="lr-tb"/>
    </style:style>
    <style:style style:name="pr2" style:family="presentation" style:parent-style-name="Clean_25_20Inspiration-subtitle">
      <style:graphic-properties draw:fill-color="#ffffff" draw:auto-grow-height="true" fo:min-height="2.8cm" loext:decorative="false"/>
      <style:paragraph-properties style:writing-mode="lr-tb"/>
    </style:style>
    <style:style style:name="pr3" style:family="presentation" style:parent-style-name="Clean_25_20Inspiration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Padrão_20_1-title">
      <style:graphic-properties draw:auto-grow-height="true" fo:min-height="1.8cm" loext:decorative="false"/>
      <style:paragraph-properties style:writing-mode="lr-tb"/>
    </style:style>
    <style:style style:name="pr5" style:family="presentation" style:parent-style-name="Padrão_20_1-subtitle">
      <style:graphic-properties draw:fill-color="#ffffff" draw:auto-grow-height="true" fo:min-height="10.032cm" loext:decorative="false"/>
      <style:paragraph-properties style:writing-mode="lr-tb"/>
    </style:style>
    <style:style style:name="pr6" style:family="presentation" style:parent-style-name="Padrão_20_1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Padrão_20_1-title">
      <style:graphic-properties fo:min-height="1.8cm" loext:decorative="false"/>
      <style:paragraph-properties style:writing-mode="lr-tb"/>
    </style:style>
    <style:style style:name="pr8" style:family="presentation" style:parent-style-name="Padrão_20_1-outline1">
      <style:graphic-properties fo:min-height="11.93cm" loext:decorative="false"/>
      <style:paragraph-properties style:writing-mode="lr-tb"/>
    </style:style>
    <style:style style:name="pr9" style:family="presentation" style:parent-style-name="Padrão_20_1-notes">
      <style:graphic-properties draw:fill-color="#ffffff" fo:min-height="13.364cm" loext:decorative="false"/>
      <style:paragraph-properties style:writing-mode="lr-tb"/>
    </style:style>
    <style:style style:name="pr10" style:family="presentation" style:parent-style-name="Padrão_20_1-title">
      <style:graphic-properties fo:min-height="3.465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-color="#ffffff"/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ff0000" loext:opacity="100%"/>
    </style:style>
    <style:style style:name="T4" style:family="text">
      <style:text-properties fo:color="#00a933" loext:opacity="100%"/>
    </style:style>
    <style:style style:name="T5" style:family="text">
      <style:text-properties fo:color="#000000" loext:opacity="100%" fo:font-size="21pt" fo:background-color="transparent" style:font-size-asian="21pt" style:font-size-complex="21pt"/>
    </style:style>
    <style:style style:name="T6" style:family="text">
      <style:text-properties fo:color="#000000" loext:opacity="100%"/>
    </style:style>
    <style:style style:name="T7" style:family="text">
      <style:text-properties style:use-window-font-color="true" loext:opacity="0%" fo:font-size="21pt" style:font-size-asian="21pt" style:font-size-complex="21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800080" loext:opacity="100%"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ean_25_20Inspiration" presentation:presentation-page-layout-name="AL1T0">
        <office:forms form:automatic-focus="false" form:apply-design-mode="false"/>
        <draw:frame presentation:style-name="pr1" draw:layer="layout" svg:width="24.8cm" svg:height="4.615cm" svg:x="0.8cm" svg:y="5.585cm" presentation:class="title" presentation:user-transformed="true">
          <draw:text-box>
            <text:p>Progetto RTOS: Parking Assistant with Smart Features </text:p>
          </draw:text-box>
        </draw:frame>
        <draw:frame presentation:style-name="pr2" draw:text-style-name="P1" draw:layer="layout" svg:width="16.2cm" svg:height="2.8cm" svg:x="10.8cm" svg:y="12.2cm" presentation:class="subtitle" presentation:user-transformed="true">
          <draw:text-box>
            <text:p>Davide Buchignani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_20_1" presentation:presentation-page-layout-name="AL1T0">
        <office:forms form:automatic-focus="false" form:apply-design-mode="false"/>
        <draw:frame presentation:style-name="pr4" draw:text-style-name="P3" draw:layer="layout" svg:width="23.4cm" svg:height="1.8cm" svg:x="1.4cm" svg:y="1.8cm" presentation:class="title" presentation:user-transformed="true">
          <draw:text-box>
            <text:p>Traccia del progetto</text:p>
          </draw:text-box>
        </draw:frame>
        <draw:frame presentation:style-name="pr5" draw:text-style-name="P5" draw:layer="layout" svg:width="25.72cm" svg:height="10.032cm" svg:x="0.68cm" svg:y="7.768cm" presentation:class="subtitle" presentation:user-transformed="true">
          <draw:text-box>
            <text:p text:style-name="P4"><text:span text:style-name="T1">Sistema di parcheggio assistito intelligente, basandosi sull'esempio fornito nel regolamento del progetto, includendo validazione e logica di filtering on-device con comunicazione tramite microROS ad un host. </text:span></text:p>
            <text:p text:style-name="P4"><text:span text:style-name="T1">Microprocessore: </text:span><text:span text:style-name="T2">ESP32-S3</text:span></text:p>
            <text:p text:style-name="P4"><text:span text:style-name="T1"/></text:p>
            <text:p text:style-name="P4"><text:span text:style-name="T1"/></text:p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_20_1" presentation:presentation-page-layout-name="AL2T1">
        <office:forms form:automatic-focus="false" form:apply-design-mode="false"/>
        <draw:frame presentation:style-name="pr7" draw:layer="layout" svg:width="19.6cm" svg:height="1.8cm" svg:x="1.2cm" svg:y="1.8cm" presentation:class="title" presentation:user-transformed="true">
          <draw:text-box>
            <text:p>Modifiche alla traccia</text:p>
          </draw:text-box>
        </draw:frame>
        <draw:frame presentation:style-name="pr8" draw:layer="layout" svg:width="24.639cm" svg:height="12.18cm" svg:x="1.4cm" svg:y="5.82cm" presentation:class="outline" presentation:user-transformed="true">
          <draw:text-box>
            <text:list text:style-name="L2">
              <text:list-header>
                <text:p>- Trasmissione dei dati:</text:p>
                <text:list>
                  <text:list-header>
                    <text:p><text:span text:style-name="T3">MicroROS</text:span> <text:s/>→ <text:span text:style-name="T4">Custom UDP sender/receiver</text:span></text:p>
                    <text:p><text:span text:style-name="T5">Il componente ESP-IDF di MicroROS é purtroppo deprecato, in attesa di un update per la versione 5.5.x di ESP-IDF. Anche con una </text:span><text:span text:style-name="T5"><text:a xlink:href="https://github.com/Amronos/micro_ros_espidf_component/tree/support-esp-idf-v5.5#" xlink:type="simple">repo privata</text:a></text:span><text:span text:style-name="T5"><text:s/>che aggiorna questo componenete, non sono riuscito ad utilizzare l’agente MicroROS per un OOM error del buffer di serializzazione. Ho pertanto utilizzato un semplice UDP Packet sender per la board, e un receiver lato host per publicare i messaggi su dei topic ROS.</text:span></text:p>
                  </text:list-header>
                </text:list>
                <text:p><text:span text:style-name="T6">- Sensori utilizzati:</text:span></text:p>
                <text:list>
                  <text:list-header>
                    <text:p><text:span text:style-name="T3">Sensori fisici </text:span><text:span text:style-name="T6">→ </text:span><text:span text:style-name="T4">Dati simulati</text:span><text:span text:style-name="T6"> </text:span></text:p>
                    <text:p><text:span text:style-name="T7">Dato l’Erasmus Traineeship che sto attualmente completando, mi sono trovato impossibilitato ad utilizzare i miei sensori personali, e sono ricorso ad una simulazione di input dei dati basata su una curva sinusoidale unita a del rumore e fault aggiunte per simulare un oggetto che si avvicina e si allontana ciclicamente.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_20_1" presentation:presentation-page-layout-name="AL2T1">
        <office:forms form:automatic-focus="false" form:apply-design-mode="false"/>
        <draw:frame presentation:style-name="pr7" draw:layer="layout" svg:width="19.6cm" svg:height="1.8cm" svg:x="1.2cm" svg:y="1.8cm" presentation:class="title" presentation:user-transformed="true">
          <draw:text-box>
            <text:p>Esecuzione On-Device</text:p>
          </draw:text-box>
        </draw:frame>
        <draw:frame presentation:style-name="pr8" draw:layer="layout" svg:width="24.639cm" svg:height="12.18cm" svg:x="0.8cm" svg:y="4.42cm" presentation:class="outline" presentation:user-transformed="true">
          <draw:text-box>
            <text:list text:style-name="L2">
              <text:list-header>
                <text:p>La pipeline che esegue sulla board prevede</text:p>
                <text:p><text:span text:style-name="T8">1. Sensing</text:span>: Generare dati di input simulati</text:p>
                <text:p><text:span text:style-name="T8">2. Filtering</text:span>: Filtrare un sample tramite un low-pass filter per ridurre il rumore.</text:p>
                <text:p><text:span text:style-name="T8">3. Validating</text:span>: Effettuare controlli sul dato filtrato, sia assoluti che relativi ad un generico sensore ultrasonico.</text:p>
                <text:p><text:span text:style-name="T8">4. Deciding</text:span>: Andare a convertire i rilevamenti in uno stato significativo</text:p>
                <text:p><text:span text:style-name="T8">5. Feedback</text:span>: Convertire lo stato attuale in un messaggio </text:p>
                <text:p>Ogni passaggio prevede la propria Task e Queue dedicate.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_20_1" presentation:presentation-page-layout-name="AL2T1">
        <office:forms form:automatic-focus="false" form:apply-design-mode="false"/>
        <draw:frame presentation:style-name="pr7" draw:layer="layout" svg:width="19.6cm" svg:height="1.8cm" svg:x="1.2cm" svg:y="1.8cm" presentation:class="title" presentation:user-transformed="true">
          <draw:text-box>
            <text:p>Strumenti per l’host</text:p>
          </draw:text-box>
        </draw:frame>
        <draw:frame presentation:style-name="pr8" draw:layer="layout" svg:width="24.639cm" svg:height="12.18cm" svg:x="1.4cm" svg:y="5.82cm" presentation:class="outline">
          <draw:text-box>
            <text:list text:style-name="L2">
              <text:list-header>
                <text:p>Sono aggiunti nella directory del progetto due script Python presenti nel folder “host_tools”:</text:p>
                <text:p><text:span text:style-name="T9">udp2ros_bridge.py</text:span><text:span text:style-name="T10"> </text:span></text:p>
                <text:list>
                  <text:list-header>
                    <text:p>Node che si mette in ascolto per i pacchetti mandati dalla board e li converte nei topic ROS rispettivi una volta ricevuti</text:p>
                  </text:list-header>
                </text:list>
                <text:p><text:span text:style-name="T9">ros_dashboard.py</text:span></text:p>
                <text:list>
                  <text:list-header>
                    <text:p>Server locale che hosta una dashboard per visualizzare i dati provenienti dai vari topic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_20_1" presentation:presentation-page-layout-name="AL2T1">
        <office:forms form:automatic-focus="false" form:apply-design-mode="false"/>
        <draw:frame presentation:style-name="pr10" draw:layer="layout" svg:width="23.6cm" svg:height="3.465cm" svg:x="1.2cm" svg:y="0.968cm" presentation:class="title" presentation:user-transformed="true">
          <draw:text-box>
            <text:p>Richieste aggiuntive del progetto</text:p>
          </draw:text-box>
        </draw:frame>
        <draw:frame presentation:style-name="pr8" draw:layer="layout" svg:width="24.639cm" svg:height="12.18cm" svg:x="0.961cm" svg:y="5.62cm" presentation:class="outline" presentation:user-transformed="true">
          <draw:text-box>
            <text:list text:style-name="L2">
              <text:list-header>
                <text:p>Come da richiesta del progetto, ho implementato una serie di <text:span text:style-name="T8">task + queue</text:span> con priorità fisse unito al sistema operativo <text:span text:style-name="T8">FreeRTOS</text:span> della scheda <text:span text:style-name="T8">ESP32</text:span> che si occupa della schedulazione delle singole istanze di task.</text:p>
                <text:p/>
                <text:p><text:span text:style-name="T8">ROS</text:span> viene utilizzato per comunicare, e la parte di processing viene effettuata <text:span text:style-name="T8">on-device</text:span>. 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_20_1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Funzionamento </text:p>
          </draw:text-box>
        </draw:frame>
        <draw:frame presentation:style-name="pr8" draw:layer="layout" svg:width="24.639cm" svg:height="12.18cm" svg:x="1.4cm" svg:y="5.82cm" presentation:class="outline" presentation:placeholder="true">
          <draw:text-box/>
        </draw:frame>
        <draw:frame draw:style-name="gr2" draw:text-style-name="P6" draw:layer="layout" svg:width="12cm" svg:height="8.457cm" svg:x="0.8cm" svg:y="3.8cm">
          <draw:image xlink:href="Pictures/100000010000048A00000333762984B1.png" xlink:type="simple" xlink:show="embed" xlink:actuate="onLoad" draw:mime-type="image/png">
            <text:p/>
          </draw:image>
        </draw:frame>
        <draw:frame draw:style-name="gr2" draw:text-style-name="P6" draw:layer="layout" svg:width="10.625cm" svg:height="7.489cm" svg:x="14cm" svg:y="4.334cm">
          <draw:image xlink:href="Pictures/100000010000048A000003332E63F17A.png" xlink:type="simple" xlink:show="embed" xlink:actuate="onLoad" draw:mime-type="image/png">
            <text:p/>
          </draw:image>
        </draw:frame>
        <draw:frame draw:style-name="gr2" draw:text-style-name="P6" draw:layer="layout" svg:width="10.784cm" svg:height="7.6cm" svg:x="0.816cm" svg:y="12cm">
          <draw:image xlink:href="Pictures/100000010000048A00000333123C7681.png" xlink:type="simple" xlink:show="embed" xlink:actuate="onLoad" draw:mime-type="image/png">
            <text:p/>
          </draw:image>
        </draw:frame>
        <draw:frame draw:style-name="gr2" draw:text-style-name="P6" draw:layer="layout" svg:width="13.105cm" svg:height="5.092cm" svg:x="12.8cm" svg:y="12.908cm">
          <draw:image xlink:href="Pictures/100000010000036B00000154C89FC70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_20_1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Funzionamento</text:p>
          </draw:text-box>
        </draw:frame>
        <draw:frame presentation:style-name="pr8" draw:layer="layout" svg:width="24.639cm" svg:height="12.18cm" svg:x="1.4cm" svg:y="5.82cm" presentation:class="outline" presentation:placeholder="true">
          <draw:text-box/>
        </draw:frame>
        <draw:frame draw:style-name="gr2" draw:text-style-name="P6" draw:layer="layout" svg:width="20.178cm" svg:height="7.8cm" draw:transform="skewX (0.00191986217719376) translate (0.815cm 3.8cm)">
          <draw:image xlink:href="Pictures/100000010000038C0000015FA5A6A67A.png" xlink:type="simple" xlink:show="embed" xlink:actuate="onLoad" draw:mime-type="image/png">
            <text:p/>
          </draw:image>
        </draw:frame>
        <draw:frame draw:style-name="gr2" draw:text-style-name="P6" draw:layer="layout" svg:width="20.179cm" svg:height="7.8cm" svg:x="5.86cm" svg:y="10.2cm">
          <draw:image xlink:href="Pictures/100000010000038C0000015F3EDE71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BigNoodleTitling" svg:font-family="BigNoodleTitling" style:font-pitch="variable"/>
    <style:font-face style:name="Cabin" svg:font-family="Cabin" style:font-pitch="variable"/>
    <style:font-face style:name="Cabin1" svg:font-family="Cabin" style:font-adornments="Regular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eague Gothic" svg:font-family="'League Gothic'" style:font-family-generic="swiss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ean_25_20Inspiration-background" style:display-name="Clean%20Inspiration-background" style:family="presentation">
      <style:graphic-properties draw:stroke="none" draw:fill="none"/>
      <style:text-properties style:letter-kerning="true"/>
    </style:style>
    <style:style style:name="Clean_25_20Inspiration-backgroundobjects" style:display-name="Clean%20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ean_25_20Inspiration-notes" style:display-name="Clean%20Inspir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ean_25_20Inspiration-outline1" style:display-name="Clean%20Inspiration-outline1" style:family="presentation">
      <style:graphic-properties draw:stroke="none" draw:fill="none" draw:auto-grow-height="false" draw:fit-to-size="false" style:shrink-to-fit="true">
        <text:list-style style:name="Clean_25_20Inspiration-outline1" style:display-name="Clean%20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333333" loext:opacity="100%" style:text-outline="false" style:text-line-through-style="none" style:text-line-through-type="none" style:font-name="League Gothic" fo:font-family="'League Gothic'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lean_25_20Inspiration-outline2" style:display-name="Clean%20Inspiration-outline2" style:family="presentation" style:parent-style-name="Clean_25_20Inspiration-outline1">
      <style:paragraph-properties fo:margin-top="0cm" fo:margin-bottom="0.4cm"/>
      <style:text-properties fo:color="#333333" loext:opacity="100%" style:font-name="League Gothic" fo:font-family="'League Gothic'" style:font-family-generic="swiss" style:font-pitch="variable" fo:font-size="36pt" fo:font-style="normal" style:font-size-asian="36pt" style:font-style-asian="normal" style:font-size-complex="36pt" style:font-style-complex="normal"/>
    </style:style>
    <style:style style:name="Clean_25_20Inspiration-outline3" style:display-name="Clean%20Inspiration-outline3" style:family="presentation" style:parent-style-name="Clean_25_20Inspiration-outline2">
      <style:paragraph-properties fo:margin-top="0cm" fo:margin-bottom="0.3cm"/>
      <style:text-properties fo:color="#ffffff" loext:opacity="100%" style:font-name="BigNoodleTitling" fo:font-family="BigNoodleTitling" style:font-pitch="variable" fo:font-size="24pt" style:font-size-asian="24pt" style:font-size-complex="24pt"/>
    </style:style>
    <style:style style:name="Clean_25_20Inspiration-outline4" style:display-name="Clean%20Inspiration-outline4" style:family="presentation" style:parent-style-name="Clean_25_20Inspiration-outline3">
      <style:paragraph-properties fo:margin-top="0cm" fo:margin-bottom="0.2cm"/>
      <style:text-properties fo:color="#ffffff" loext:opacity="100%" style:font-name="BigNoodleTitling" fo:font-family="BigNoodleTitling" style:font-pitch="variable" fo:font-size="20pt" style:font-size-asian="20pt" style:font-size-complex="20pt"/>
    </style:style>
    <style:style style:name="Clean_25_20Inspiration-outline5" style:display-name="Clean%20Inspiration-outline5" style:family="presentation" style:parent-style-name="Clean_25_20Inspiration-outline4">
      <style:paragraph-properties fo:margin-top="0cm" fo:margin-bottom="0.1cm"/>
      <style:text-properties fo:color="#ffffff" loext:opacity="100%" style:font-name="BigNoodleTitling" fo:font-family="BigNoodleTitling" style:font-pitch="variable" fo:font-size="20pt" style:font-size-asian="20pt" style:font-size-complex="20pt"/>
    </style:style>
    <style:style style:name="Clean_25_20Inspiration-outline6" style:display-name="Clean%20Inspiration-outline6" style:family="presentation" style:parent-style-name="Clean_25_20Inspiration-outline5">
      <style:paragraph-properties fo:margin-top="0cm" fo:margin-bottom="0.1cm"/>
      <style:text-properties fo:color="#ffffff" loext:opacity="100%" style:font-name="BigNoodleTitling" fo:font-family="BigNoodleTitling" style:font-pitch="variable" fo:font-size="20pt" style:font-size-asian="20pt" style:font-size-complex="20pt"/>
    </style:style>
    <style:style style:name="Clean_25_20Inspiration-outline7" style:display-name="Clean%20Inspiration-outline7" style:family="presentation" style:parent-style-name="Clean_25_20Inspiration-outline6">
      <style:paragraph-properties fo:margin-top="0cm" fo:margin-bottom="0.1cm"/>
      <style:text-properties fo:color="#ffffff" loext:opacity="100%" style:font-name="BigNoodleTitling" fo:font-family="BigNoodleTitling" style:font-pitch="variable" fo:font-size="20pt" style:font-size-asian="20pt" style:font-size-complex="20pt"/>
    </style:style>
    <style:style style:name="Clean_25_20Inspiration-outline8" style:display-name="Clean%20Inspiration-outline8" style:family="presentation" style:parent-style-name="Clean_25_20Inspiration-outline7">
      <style:paragraph-properties fo:margin-top="0cm" fo:margin-bottom="0.1cm"/>
      <style:text-properties fo:font-size="20pt" style:font-size-asian="20pt" style:font-size-complex="20pt"/>
    </style:style>
    <style:style style:name="Clean_25_20Inspiration-outline9" style:display-name="Clean%20Inspiration-outline9" style:family="presentation" style:parent-style-name="Clean_25_20Inspiration-outline8">
      <style:paragraph-properties fo:margin-top="0cm" fo:margin-bottom="0.1cm"/>
      <style:text-properties fo:font-size="20pt" style:font-size-asian="20pt" style:font-size-complex="20pt"/>
    </style:style>
    <style:style style:name="Clean_25_20Inspiration-subtitle" style:display-name="Clean%20Inspiration-subtitle" style:family="presentation">
      <style:graphic-properties draw:stroke="none" draw:fill="none" draw:textarea-vertical-align="middle">
        <text:list-style style:name="Clean_25_20Inspiration-subtitle" style:display-name="Clean%20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Cabin1" fo:font-family="Cabin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ean_25_20Inspiration-title" style:display-name="Clean%20Inspiration-title" style:family="presentation">
      <style:graphic-properties draw:stroke="none" draw:fill="none" draw:textarea-vertical-align="middle">
        <text:list-style style:name="Clean_25_20Inspiration-title" style:display-name="Clean%20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loext:opacity="100%" style:text-outline="false" style:text-line-through-style="none" style:text-line-through-type="none" style:font-name="League Gothic" fo:font-family="'League Gothic'" style:font-family-generic="swiss" style:font-pitch="variable" fo:font-size="4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none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auto-grow-height="false" draw:fit-to-size="false" style:shrink-to-fit="true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Cabin" fo:font-family="Cabin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paragraph-properties fo:margin-top="0cm" fo:margin-bottom="0.4cm"/>
      <style:text-properties style:font-name="Cabin" fo:font-family="Cabin" style:font-pitch="variable" fo:font-size="26pt" style:font-size-asian="26pt" style:font-size-complex="26pt"/>
    </style:style>
    <style:style style:name="Padrão_20_1-outline3" style:display-name="Padrão 1-outline3" style:family="presentation" style:parent-style-name="Padrão_20_1-outline2">
      <style:paragraph-properties fo:margin-top="0cm" fo:margin-bottom="0.3cm"/>
      <style:text-properties style:font-name="Cabin" fo:font-family="Cabin" style:font-pitch="variable" fo:font-size="26pt" style:font-size-asian="26pt" style:font-size-complex="26pt"/>
    </style:style>
    <style:style style:name="Padrão_20_1-outline4" style:display-name="Padrão 1-outline4" style:family="presentation" style:parent-style-name="Padrão_20_1-outline3">
      <style:paragraph-properties fo:margin-top="0cm" fo:margin-bottom="0.2cm"/>
      <style:text-properties style:font-name="Cabin" fo:font-family="Cabin" style:font-pitch="variable" fo:font-size="26pt" style:font-size-asian="26pt" style:font-size-complex="26pt"/>
    </style:style>
    <style:style style:name="Padrão_20_1-outline5" style:display-name="Padrão 1-outline5" style:family="presentation" style:parent-style-name="Padrão_20_1-outline4">
      <style:paragraph-properties fo:margin-top="0cm" fo:margin-bottom="0.1cm"/>
      <style:text-properties style:font-name="Cabin" fo:font-family="Cabin" style:font-pitch="variable" fo:font-size="26pt" style:font-size-asian="26pt" style:font-size-complex="26pt"/>
    </style:style>
    <style:style style:name="Padrão_20_1-outline6" style:display-name="Padrão 1-outline6" style:family="presentation" style:parent-style-name="Padrão_20_1-outline5">
      <style:paragraph-properties fo:margin-top="0cm" fo:margin-bottom="0.1cm"/>
      <style:text-properties style:font-name="Cabin" fo:font-family="Cabin" style:font-pitch="variable" fo:font-size="26pt" style:font-size-asian="26pt" style:font-size-complex="26pt"/>
    </style:style>
    <style:style style:name="Padrão_20_1-outline7" style:display-name="Padrão 1-outline7" style:family="presentation" style:parent-style-name="Padrão_20_1-outline6">
      <style:paragraph-properties fo:margin-top="0cm" fo:margin-bottom="0.1cm"/>
      <style:text-properties style:font-name="Cabin" fo:font-family="Cabin" style:font-pitch="variable" fo:font-size="26pt" style:font-size-asian="26pt" style:font-size-complex="26pt"/>
    </style:style>
    <style:style style:name="Padrão_20_1-outline8" style:display-name="Padrão 1-outline8" style:family="presentation" style:parent-style-name="Padrão_20_1-outline7">
      <style:paragraph-properties fo:margin-top="0cm" fo:margin-bottom="0.1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cm" fo:margin-bottom="0.1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Cabin1" fo:font-family="Cabin" style:font-style-name="Regular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League Gothic" fo:font-family="'League Gothic'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Clean_25_20Inspiration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Clean_25_20Inspiration-outline1">
      <style:graphic-properties fo:min-height="12.18cm" loext:decorative="false"/>
      <style:paragraph-properties style:writing-mode="lr-tb"/>
    </style:style>
    <style:style style:name="Mpr3" style:family="presentation" style:parent-style-name="Clean_25_20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Clean_25_20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Padrão_20_1-title">
      <style:graphic-properties draw:auto-grow-height="false" fo:min-height="3.507cm" loext:decorative="false"/>
      <style:paragraph-properties style:writing-mode="lr-tb"/>
    </style:style>
    <style:style style:name="Mpr6" style:family="presentation" style:parent-style-name="Padrão_20_1-outline1">
      <style:graphic-properties fo:min-height="12.18cm" loext:decorative="false"/>
      <style:paragraph-properties style:writing-mode="lr-tb"/>
    </style:style>
    <style:style style:name="Mpr7" style:family="presentation" style:parent-style-name="Padrão_20_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Padrão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Padrão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lean_25_20Inspiration" style:display-name="Clean%20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0.996cm" svg:x="0cm" svg:y="0.004cm">
        <draw:image xlink:href="Pictures/1000000000000CEB000009B0032082B5.jpg" xlink:type="simple" xlink:show="embed" xlink:actuate="onLoad" draw:mime-type="image/jpeg">
          <text:p/>
        </draw:image>
      </draw:frame>
      <draw:frame presentation:style-name="Mpr1" draw:layer="backgroundobjects" svg:width="24cm" svg:height="3.706cm" svg:x="1cm" svg:y="6.294cm" presentation:class="title">
        <draw:text-box>
          <text:p>CLIQUE PARA EDITAR O FORMATO DO TEXTO DO TÍTULO</text:p>
        </draw:text-box>
      </draw:frame>
      <draw:frame presentation:style-name="Mpr2" draw:layer="backgroundobjects" svg:width="16.2cm" svg:height="12.18cm" svg:x="10.8cm" svg:y="12.2cm" presentation:class="outline">
        <draw:text-box>
          <text:list text:style-name="ML3">
            <text:list-item>
              <text:p>Clique para editar o formato do texto da estrutura de tópicos</text:p>
              <text:list>
                <text:list-header>
                  <text:p/>
                </text:list-header>
              </text:list>
            </text:list-item>
          </text:list>
        </draw:text-box>
      </draw:frame>
      <presentation:notes style:page-layout-name="PM0">
        <draw:page-thumbnail presentation:style-name="Clean_25_20Inspiration-title" draw:layer="backgroundobjects" svg:width="14.848cm" svg:height="11.136cm" svg:x="3.075cm" svg:y="2.257cm" presentation:class="page"/>
        <draw:frame presentation:style-name="Clean_25_20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99cm" svg:height="20.999cm" svg:x="0.001cm" svg:y="0.001cm">
        <draw:image xlink:href="Pictures/1000000000000CEC000009B17C6E9ABE.jpg" xlink:type="simple" xlink:show="embed" xlink:actuate="onLoad" draw:mime-type="image/jpeg">
          <text:p/>
        </draw:image>
      </draw:frame>
      <draw:frame presentation:style-name="Mpr5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6" draw:layer="backgroundobjects" svg:width="24.639cm" svg:height="12.18cm" svg:x="1.4cm" svg:y="5.82cm" presentation:class="outline">
        <draw:text-box>
          <text:list text:style-name="ML3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448cm" svg:x="9.576cm" svg:y="18.2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8.1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drão_20_1-title" draw:layer="backgroundobjects" svg:width="0.001cm" svg:height="0.001cm" svg:x="0cm" svg:y="2.257cm" presentation:class="page"/>
        <draw:frame presentation:style-name="Padrão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1T16:31:35.050049740</meta:creation-date>
    <meta:editing-duration>PT54M</meta:editing-duration>
    <meta:editing-cycles>23</meta:editing-cycles>
    <meta:generator>LibreOffice/24.2.7.2$Linux_X86_64 LibreOffice_project/420$Build-2</meta:generator>
    <dc:date>2026-05-11T18:04:11.648875197</dc:date>
    <meta:document-statistic meta:object-count="69"/>
    <meta:template xlink:type="simple" xlink:actuate="onRequest" xlink:title="clean-inspiration" xlink:href="../../Templates/clean-inspiration.otp" meta:date="2026-05-11T16:31:34.291024152"/>
  </office:meta>
</office:document-meta>
</file>